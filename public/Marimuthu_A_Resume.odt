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fo:color="#1e293b" loext:opacity="100%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1a56db" loext:opacity="100%"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1a56db"/>
    </style:style>
    <style:style style:name="P6" style:family="paragraph" style:parent-style-name="Standard">
      <style:paragraph-properties fo:margin-top="0.353cm" fo:margin-bottom="0.176cm" style:contextual-spacing="false" fo:padding-left="0cm" fo:padding-right="0cm" fo:padding-top="0cm" fo:padding-bottom="0.071cm" fo:border-left="none" fo:border-right="none" fo:border-top="none" fo:border-bottom="0.99pt solid #1a56db"/>
      <style:text-properties fo:color="#1e293b" loext:opacity="100%" fo:font-size="11pt" fo:letter-spacing="0.071cm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.141cm" fo:margin-bottom="0.141cm" style:contextual-spacing="false"/>
    </style:style>
    <style:style style:name="P8" style:family="paragraph" style:parent-style-name="Standard">
      <style:paragraph-properties fo:margin-top="0.071cm" fo:margin-bottom="0.071cm" style:contextual-spacing="false">
        <style:tab-stops>
          <style:tab-stop style:position="16.51cm" style:type="right"/>
        </style:tab-stops>
      </style:paragraph-properties>
    </style:style>
    <style:style style:name="P9" style:family="paragraph" style:parent-style-name="Standard">
      <style:paragraph-properties fo:margin-top="0.035cm" fo:margin-bottom="0.035cm" style:contextual-spacing="false"/>
    </style:style>
    <style:style style:name="P10" style:family="paragraph" style:parent-style-name="Standard">
      <style:paragraph-properties fo:margin-top="0.106cm" fo:margin-bottom="0.071cm" style:contextual-spacing="fals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.071cm" fo:margin-bottom="0.141cm" style:contextual-spacing="false"/>
    </style:style>
    <style:style style:name="P13" style:family="paragraph" style:parent-style-name="Standard">
      <style:paragraph-properties fo:margin-top="0.053cm" fo:margin-bottom="0.035cm" style:contextual-spacing="false"/>
    </style:style>
    <style:style style:name="P14" style:family="paragraph" style:parent-style-name="List_20_Paragraph" style:list-style-name="WWNum2">
      <style:paragraph-properties fo:margin-top="0.071cm" fo:margin-bottom="0.071cm" style:contextual-spacing="false"/>
    </style:style>
    <style:style style:name="P15" style:family="paragraph" style:parent-style-name="Standard">
      <style:paragraph-properties fo:margin-top="0.141cm" fo:margin-bottom="0cm" style:contextual-spacing="false"/>
    </style:style>
    <style:style style:name="P16" style:family="paragraph" style:parent-style-name="Standard">
      <style:paragraph-properties fo:margin-top="0.053cm" fo:margin-bottom="0.035cm" style:contextual-spacing="false"/>
      <style:text-properties officeooo:paragraph-rsid="000bd68d"/>
    </style:style>
    <style:style style:name="P17" style:family="paragraph" style:parent-style-name="Comment">
      <style:paragraph-properties fo:margin-top="0.053cm" fo:margin-bottom="0.035cm" fo:text-align="start" style:text-autospace="none" style:writing-mode="lr-tb"/>
    </style:style>
    <style:style style:name="P18" style:family="paragraph" style:parent-style-name="Standard">
      <style:paragraph-properties fo:margin-top="0.035cm" fo:margin-bottom="0.035cm" style:contextual-spacing="false"/>
      <style:text-properties fo:font-size="9.5pt" fo:font-style="italic" style:font-size-asian="9.5pt" style:font-style-asian="italic" style:font-size-complex="9.5pt" style:font-style-complex="italic"/>
    </style:style>
    <style:style style:name="P19" style:family="paragraph" style:parent-style-name="Standard">
      <style:paragraph-properties fo:margin-top="0.106cm" fo:margin-bottom="0.141cm" style:contextual-spacing="false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color="#1a56db" loext:opacity="100%" fo:font-size="9.5pt" style:text-underline-style="solid" style:text-underline-width="auto" style:text-underline-color="font-color" style:font-size-asian="9.5pt" style:font-size-complex="9.5pt"/>
    </style:style>
    <style:style style:name="T3" style:family="text">
      <style:text-properties fo:color="#1e293b" loext:opacity="100%" fo:font-weight="bold" style:font-weight-asian="bold" style:font-weight-complex="bold"/>
    </style:style>
    <style:style style:name="T4" style:family="text">
      <style:text-properties fo:color="#1a56db" loext:opacity="100%"/>
    </style:style>
    <style:style style:name="T5" style:family="text">
      <style:text-properties fo:color="#1e293b" loext:opacity="100%" fo:font-size="9.5pt" fo:font-weight="bold" style:font-size-asian="9.5pt" style:font-weight-asian="bold" style:font-size-complex="9.5pt" style:font-weight-complex="bold"/>
    </style:style>
    <style:style style:name="T6" style:family="text">
      <style:text-properties fo:color="#1e293b" loext:opacity="100%" fo:font-weight="bold" officeooo:rsid="000bd68d" style:font-weight-asian="bold" style:font-weight-complex="bold"/>
    </style:style>
    <style:style style:name="T7" style:family="text">
      <style:text-properties fo:color="#1e293b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8" style:family="text">
      <style:text-properties fo:color="#1a56db" loext:opacity="100%" style:font-name="Calibri" fo:font-size="9.5pt" fo:language="en" fo:country="IN" fo:font-style="italic" style:text-underline-style="solid" style:text-underline-width="auto" style:text-underline-color="font-color" style:font-size-asian="9.5pt" style:language-asian="ja" style:country-asian="JP" style:font-style-asian="italic" style:font-name-complex="Calibri" style:font-size-complex="9.5pt" style:language-complex="en" style:country-complex="IN" style:font-style-complex="italic"/>
    </style:style>
    <style:style style:name="T9" style:family="text">
      <style:text-properties fo:color="#1e293b" loext:opacity="100%" style:font-name="Calibri" fo:font-size="9.5pt" fo:language="en" fo:country="IN" fo:font-style="italic" fo:font-weight="bold" style:font-size-asian="9.5pt" style:language-asian="ja" style:country-asian="JP" style:font-style-asian="italic" style:font-weight-asian="bold" style:font-name-complex="Calibri" style:font-size-complex="9.5pt" style:language-complex="en" style:country-complex="IN" style:font-style-complex="italic" style:font-weight-complex="bold"/>
    </style:style>
    <style:style style:name="T10" style:family="text">
      <style:text-properties fo:color="#1e293b" loext:opacity="100%" fo:font-size="9.5pt" fo:font-style="italic" style:text-underline-style="solid" style:text-underline-width="auto" style:text-underline-color="font-color" fo:font-weight="bold" style:font-size-asian="9.5pt" style:font-style-asian="italic" style:font-weight-asian="bold" style:font-size-complex="9.5pt" style:font-style-complex="italic" style:font-weight-complex="bold"/>
    </style:style>
    <style:style style:name="T11" style:family="text">
      <style:text-properties fo:color="#0563c1" loext:opacity="100%" fo:font-size="9.5pt" fo:font-style="italic" style:text-underline-style="solid" style:text-underline-width="auto" style:text-underline-color="font-color" fo:font-weight="bold" style:font-size-asian="9.5pt" style:font-style-asian="italic" style:font-weight-asian="bold" style:font-size-complex="9.5pt" style:font-style-complex="italic" style:font-weight-complex="bold"/>
    </style:style>
    <style:style style:name="T12" style:family="text">
      <style:text-properties fo:color="#1e293b" loext:opacity="100%" fo:font-size="9.5pt" fo:font-style="italic" style:text-underline-style="solid" style:text-underline-width="auto" style:text-underline-color="font-color" fo:font-weight="bold" officeooo:rsid="000bd68d" style:font-size-asian="9.5pt" style:font-style-asian="italic" style:font-weight-asian="bold" style:font-size-complex="9.5pt" style:font-style-complex="italic" style:font-weight-complex="bold"/>
    </style:style>
    <style:style style:name="T13" style:family="text">
      <style:text-properties fo:color="#1a56db" loext:opacity="100%" fo:font-size="9.5pt" fo:font-style="italic" style:text-underline-style="solid" style:text-underline-width="auto" style:text-underline-color="font-color" officeooo:rsid="000d2c28" style:font-size-asian="9.5pt" style:font-style-asian="italic" style:font-size-complex="9.5pt" style:font-style-complex="italic"/>
    </style:style>
    <style:style style:name="T14" style:family="text">
      <style:text-properties officeooo:rsid="000d2c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MUTHU A</text:p>
      <text:p text:style-name="P2">Computer Science Engineering Student <text:s/>| <text:s/>Python Developer <text:s/>| <text:s/>Web Developer <text:s/>| <text:s/>AI Enthusiast</text:p>
      <text:p text:style-name="P3"><text:span text:style-name="T1">Ponnamaravathy, Tamil Nadu, India <text:s/>| <text:s/>+91 6369086341 <text:s/>| <text:s/></text:span><text:a xlink:type="simple" xlink:href="mailto:amarimuthu5898@gmail.com" text:style-name="ListLabel_20_19" text:visited-style-name="ListLabel_20_19"><text:span text:style-name="T2">amarimuthu5898@gmail.com</text:span></text:a></text:p>
      <text:p text:style-name="P4"><text:a xlink:type="simple" xlink:href="https://www.linkedin.com/in/marimuthu-a-" text:style-name="ListLabel_20_20" text:visited-style-name="ListLabel_20_20"><text:span text:style-name="T2">LinkedIn</text:span></text:a><text:span text:style-name="T1"> <text:s/>| <text:s/></text:span><text:a xlink:type="simple" xlink:href="https://github.com/Marimuthu-07" text:style-name="ListLabel_20_21" text:visited-style-name="ListLabel_20_21"><text:span text:style-name="T2">GitHub</text:span></text:a><text:span text:style-name="T1"> <text:s text:c="2"/></text:span></text:p>
      <text:p text:style-name="P5"/>
      <text:p text:style-name="P6">PROFESSIONAL SUMMARY</text:p>
      <text:p text:style-name="P7">Motivated B.Tech Computer Science Engineering student with a strong foundation in Python, C/C++, JavaScript, and Web Development. Passionate about building practical software solutions and continuously learning modern technologies. Experienced in developing and deploying real-world projects, with a growing interest in Artificial Intelligence, Full-Stack Development, and Software Engineering. Seeking internship opportunities to apply technical skills, gain industry experience, and contribute to impactful projects.</text:p>
      <text:p text:style-name="P6">EDUCATION</text:p>
      <text:p text:style-name="P8"><text:span text:style-name="T3">B.Tech – Computer Science and Engineering</text:span><text:span text:style-name="T4"><text:tab/>Expected 2029</text:span></text:p>
      <text:p text:style-name="P9">JNN Institute of Engineering, Tamil Nadu <text:s/>| <text:s/><text:span text:style-name="T3">CGPA: 8.6</text:span> <text:s/>| <text:s/>First Year Completed</text:p>
      <text:p text:style-name="P6">TECHNICAL SKILLS</text:p>
      <text:p text:style-name="P10"><text:span text:style-name="T3">Programming Languages: <text:s/></text:span>Python, C, C++, JavaScript</text:p>
      <text:p text:style-name="P11"><text:span text:style-name="T3">Web Development: <text:s/></text:span>HTML5, CSS3, JavaScript, Responsive Web Design</text:p>
      <text:p text:style-name="P11"><text:span text:style-name="T3">Tools &amp; Technologies: <text:s/></text:span>Git, GitHub, VS Code, Node.js, Electron, AI Development Tools</text:p>
      <text:p text:style-name="P12"><text:span text:style-name="T3">Areas of Interest: <text:s/></text:span>Full-Stack Web Development, Artificial Intelligence, Software Engineering, Open Source, Problem Solving</text:p>
      <text:p text:style-name="P6">PROJECTS</text:p>
      <text:p text:style-name="P8"><text:span text:style-name="T3">LearnVault – Learning Management Platform</text:span><text:span text:style-name="T4"><text:tab/>HTML · CSS · JavaScript · Git · Render</text:span></text:p>
      <text:p text:style-name="P13"><text:span text:style-name="T5">Live Demo: </text:span><text:a xlink:type="simple" xlink:href="https://learnvault-app.onrender.com/" text:style-name="ListLabel_20_22" text:visited-style-name="ListLabel_20_22"><text:span text:style-name="T2">learnvault-app.onrender.com</text:span></text:a><text:span text:style-name="T5"> <text:s text:c="2"/>GitHub: </text:span><text:a xlink:type="simple" xlink:href="https://github.com/Marimuthu-07/LearnVault_app" text:style-name="ListLabel_20_24" text:visited-style-name="ListLabel_20_24"><text:span text:style-name="T2">github.com/Marimuthu-07/LearnVault_app</text:span></text:a></text:p>
      <text:list text:style-name="WWNum2">
        <text:list-item text:start-value="1">
          <text:p text:style-name="P14">Built a modern, responsive web-based learning management platform to organize educational resources.</text:p>
        </text:list-item>
        <text:list-item>
          <text:p text:style-name="P14">Structured learning content into navigable categories, improving accessibility for learners.</text:p>
        </text:list-item>
        <text:list-item>
          <text:p text:style-name="P14">Deployed the live application on Render and maintained version control using Git and GitHub.</text:p>
        </text:list-item>
      </text:list>
      <text:p text:style-name="P15"/>
      <text:p text:style-name="P8"><text:span text:style-name="T6">Hormonix</text:span><text:span text:style-name="T3"> – Desktop Music Player</text:span><text:span text:style-name="T4"><text:tab/>Electron · Node.js · HTML · CSS · JavaScript</text:span></text:p>
      <text:p text:style-name="P16"><text:span text:style-name="T7">Live Demo: </text:span><office:annotation office:name="__Annotation__788_2099773985" loext:resolved="false"><dc:creator>Unknown Author</dc:creator><dc:date>2026-07-07T22:49:53.665703300</dc:date><text:p text:style-name="P17"><text:span text:style-name="T8">https://hormonix.vercel.app</text:span><text:span text:style-name="T9"> </text:span></text:p></office:annotation><office:annotation-end office:name="__Annotation__788_2099773985"/><text:span text:style-name="T10"><text:s/></text:span><text:a xlink:type="simple" xlink:href="https://hormonix.vercel.app/" text:style-name="Internet_20_link" text:visited-style-name="Visited_20_Internet_20_Link"><text:span text:style-name="T11">hormonix.vercel.app</text:span><text:span text:style-name="T12"> </text:span></text:a><text:span text:style-name="T7"><text:s text:c="2"/>GitHub: </text:span><text:a xlink:type="simple" xlink:href="https://github.com/Marimuthu-07/HORMONIX" text:style-name="Internet_20_link" text:visited-style-name="Visited_20_Internet_20_Link"><text:span text:style-name="T13">github.com/Marimuthu-07/HORMONIX</text:span></text:a></text:p>
      <text:list text:continue-numbering="true" text:style-name="WWNum2">
        <text:list-item>
          <text:p text:style-name="P14">Developing a performance-focused desktop music player with offline audio playback and playlist management.</text:p>
        </text:list-item>
        <text:list-item>
          <text:p text:style-name="P14">Implementing a streaming-platform-inspired UI with a built-in visualizer mode for immersive listening.</text:p>
        </text:list-item>
        <text:list-item>
          <text:p text:style-name="P14">Architecting the application using Electron and Node.js for cross-platform desktop deployment.</text:p>
        </text:list-item>
      </text:list>
      <text:p text:style-name="P6">CERTIFICATIONS</text:p>
      <text:p text:style-name="P8"><text:span text:style-name="T3">Google AI Essentials Specialization</text:span><text:tab/>May 2026</text:p>
      <text:p text:style-name="P18">Google &amp; Coursera</text:p>
      <text:list text:continue-numbering="true" text:style-name="WWNum2">
        <text:list-item>
          <text:p text:style-name="P14">Completed a five-course specialization covering AI fundamentals, prompt engineering, and responsible AI.</text:p>
        </text:list-item>
        <text:list-item>
          <text:p text:style-name="P14">Earned the official Google AI Essentials V1 Badge demonstrating practical AI tool proficiency.</text:p>
        </text:list-item>
      </text:list>
      <text:p text:style-name="P15"/>
      <text:p text:style-name="P8"><text:span text:style-name="T3">Programming with Python</text:span><text:tab/>July 2025</text:p>
      <text:p text:style-name="P18">Internshala Trainings <text:s/>| <text:s/>Six-week intensive program</text:p>
      <text:list text:continue-numbering="true" text:style-name="WWNum2">
        <text:list-item>
          <text:p text:style-name="P14">Covered Python fundamentals, OOP, SQLite database integration, PyQt GUI development, and AI applications.</text:p>
        </text:list-item>
      </text:list>
      <text:p text:style-name="P15"/>
      <text:p text:style-name="P8"><text:soft-page-break/><text:span text:style-name="T3">Programming with Python </text:span><text:tab/>July 2025</text:p>
      <text:p text:style-name="P18">Skill India / NSDC / Scholiverse Educare Pvt. Ltd.</text:p>
      <text:p text:style-name="P6">ACHIEVEMENTS &amp; ACTIVITIES</text:p>
      <text:list text:continue-numbering="true" text:style-name="WWNum2">
        <text:list-item>
          <text:p text:style-name="P14">Achieved a CGPA of 8.<text:span text:style-name="T14">6</text:span> during the first <text:span text:style-name="T14">year</text:span> of B.Tech CSE.</text:p>
        </text:list-item>
        <text:list-item>
          <text:p text:style-name="P14">Built and deployed real-world software projects in the first year of engineering.</text:p>
        </text:list-item>
        <text:list-item>
          <text:p text:style-name="P14">Actively practicing Data Structures and Algorithms on LeetCode.</text:p>
        </text:list-item>
        <text:list-item>
          <text:p text:style-name="P14">Participated in multiple technical and academic events during first year.</text:p>
        </text:list-item>
        <text:list-item>
          <text:p text:style-name="P14">Continuously improving skills in Web Development, Artificial Intelligence, and Software Engineering.</text:p>
        </text:list-item>
      </text:list>
      <text:p text:style-name="P6">LANGUAGES</text:p>
      <text:p text:style-name="P19"><text:span text:style-name="T3">Tamil</text:span> (Native) <text:s text:c="3"/><text:span text:style-name="T3">English</text:span> (Professional Working Proficiency)</text:p>
      <text:p text:style-name="P6">CAREER GOAL</text:p>
      <text:p text:style-name="P7">To become a skilled Software Engineer by mastering modern development technologies, contributing to impactful projects, gaining industry experience through internships, and pursuing advanced studies in Computer Science through GATE and higher education opportuniti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475569" loext:opacity="100%" style:font-name="Calibri" fo:font-size="10pt" fo:language="en" fo:country="IN" style:letter-kerning="false" style:font-name-asian="Calibri1" style:font-size-asian="10pt" style:language-asian="ja" style:country-asian="JP" style:font-name-complex="Calibri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475569" loext:opacity="100%" style:font-name="Calibri" fo:font-size="10pt" fo:language="en" fo:country="IN" style:letter-kerning="false" style:font-name-asian="Calibri1" style:font-size-asian="10pt" style:language-asian="ja" style:country-asian="JP" style:font-name-complex="Calibri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default-outline-level="1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ize="16pt" style:font-size-asian="16pt" style:font-size-complex="16pt"/>
    </style:style>
    <style:style style:name="Heading_20_2" style:display-name="Heading 2" style:family="paragraph" style:default-outline-level="2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ize="13pt" style:font-size-asian="13pt" style:font-size-complex="13pt"/>
    </style:style>
    <style:style style:name="Heading_20_3" style:display-name="Heading 3" style:family="paragraph" style:default-outline-level="3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 fo:font-size="12pt" style:font-size-asian="12pt" style:font-size-complex="12pt"/>
    </style:style>
    <style:style style:name="Heading_20_4" style:display-name="Heading 4" style:family="paragraph" style:default-outline-level="4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font-size="28pt" style:font-size-asian="28pt" style:font-size-complex="28pt"/>
    </style:style>
    <style:style style:name="Strong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ootnote" style:family="paragraph" loext:linked-style-name="Footnote_20_Text_20_Char" style:class="extra">
      <style:paragraph-properties fo:margin-top="0cm" fo:margin-bottom="0cm" style:contextual-spacing="false" fo:text-align="start" style:justify-single-word="false" fo:orphans="2" fo:widows="2" style:writing-mode="lr-tb"/>
    </style:style>
    <style:style style:name="Endnote" style:family="paragraph" loext:linked-style-name="Endnote_20_Text_20_Char" style:class="extra">
      <style:paragraph-properties fo:margin-top="0cm" fo:margin-bottom="0cm" style:contextual-spacing="false" fo:text-align="start" style:justify-single-word="false" fo:orphans="2" fo:widows="2" style:writing-mode="lr-tb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56db" loext:opacity="100%" fo:font-size="9.5pt" style:text-underline-style="solid" style:text-underline-width="auto" style:text-underline-color="font-color" style:font-size-asian="9.5pt" style:font-size-complex="9.5pt"/>
    </style:style>
    <style:style style:name="ListLabel_20_20" style:display-name="ListLabel 20" style:family="text">
      <style:text-properties fo:color="#1a56db" loext:opacity="100%" fo:font-size="9.5pt" style:text-underline-style="solid" style:text-underline-width="auto" style:text-underline-color="font-color" style:font-size-asian="9.5pt" style:font-size-complex="9.5pt"/>
    </style:style>
    <style:style style:name="ListLabel_20_21" style:display-name="ListLabel 21" style:family="text">
      <style:text-properties fo:color="#1a56db" loext:opacity="100%" fo:font-size="9.5pt" style:text-underline-style="solid" style:text-underline-width="auto" style:text-underline-color="font-color" style:font-size-asian="9.5pt" style:font-size-complex="9.5pt"/>
    </style:style>
    <style:style style:name="ListLabel_20_22" style:display-name="ListLabel 22" style:family="text">
      <style:text-properties fo:color="#1a56db" loext:opacity="100%" fo:font-size="9.5pt" style:text-underline-style="solid" style:text-underline-width="auto" style:text-underline-color="font-color" style:font-size-asian="9.5pt" style:font-size-complex="9.5pt"/>
    </style:style>
    <style:style style:name="ListLabel_20_23" style:display-name="ListLabel 23" style:family="text">
      <style:text-properties fo:color="#1a56db" loext:opacity="100%" fo:font-size="9.5pt" style:text-underline-style="solid" style:text-underline-width="auto" style:text-underline-color="font-color" style:font-size-asian="9.5pt" style:font-size-complex="9.5pt"/>
    </style:style>
    <style:style style:name="ListLabel_20_24" style:display-name="ListLabel 24" style:family="text">
      <style:text-properties fo:color="#1a56db" loext:opacity="100%" fo:font-size="9.5pt" style:text-underline-style="solid" style:text-underline-width="auto" style:text-underline-color="font-color" style:font-size-asian="9.5pt" style:font-size-complex="9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0.847cm"/>
        </style:list-level-properties>
      </text:list-level-style-bullet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5</meta:editing-cycles>
    <meta:creation-date>2026-06-15T15:33:00</meta:creation-date>
    <dc:date>2026-07-07T22:58:26.338415100</dc:date>
    <meta:editing-duration>PT5M16S</meta:editing-duration>
    <meta:generator>LibreOffice/25.8.7.3$Windows_X86_64 LibreOffice_project/30742500f2d3eb4366ac312fa33d3dcabdb3eba5</meta:generator>
    <meta:document-statistic meta:table-count="0" meta:image-count="0" meta:object-count="0" meta:page-count="2" meta:paragraph-count="45" meta:word-count="448" meta:character-count="3445" meta:non-whitespace-character-count="3019"/>
    <meta:user-defined meta:name="AppVersion">16.0000</meta:user-defined>
    <meta:template xlink:type="simple" xlink:actuate="onRequest" xlink:title="Normal.dotm" xlink:href=""/>
  </office:meta>
</office:document-meta>
</file>